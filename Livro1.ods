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3" style:family="table-cell" style:parent-style-name="Default" style:data-style-name="N12">
      <style:table-cell-properties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çã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ome</text:p>
          </table:table-cell>
          <table:table-cell office:value-type="string" table:style-name="ce2">
            <text:p>Maçã Fuj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ço</text:p>
          </table:table-cell>
          <table:table-cell office:value-type="currency" office:value="1.2" table:style-name="ce3">
            <text:p>1,20 €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ck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Maçã_2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Nome</text:p>
          </table:table-cell>
          <table:table-cell office:value-type="string" table:style-name="ce2">
            <text:p>Maçã Ga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ço</text:p>
          </table:table-cell>
          <table:table-cell office:value-type="currency" office:value="1.1000000000000001" table:style-name="ce3">
            <text:p>1,10 €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ck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Maçã_3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Nome</text:p>
          </table:table-cell>
          <table:table-cell office:value-type="string" table:style-name="ce2">
            <text:p>Maçã Ver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ço</text:p>
          </table:table-cell>
          <table:table-cell office:value-type="currency" office:value="1.3" table:style-name="ce3">
            <text:p>1,30 €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ck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currency-style style:name="N12P0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meta:initial-creator>Estagiário Techguild</meta:initial-creator>
    <dc:creator>Estagiário Techguild</dc:creator>
    <meta:creation-date>2026-05-12T17:49:17Z</meta:creation-date>
    <dc:date>2026-05-12T17:59:19Z</dc:date>
  </office:meta>
</office:document-meta>
</file>